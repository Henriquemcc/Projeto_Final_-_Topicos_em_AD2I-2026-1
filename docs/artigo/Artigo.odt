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P1" style:family="paragraph" style:parent-style-name="Title" style:master-page-name="Standard">
      <style:paragraph-properties style:page-number="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_2no8pyrzsqq"/>Classificação de Imagens de Plantas Doentes utilizando Visão Computacional</text:p>
      <text:p text:style-name="Heading_20_1"><text:bookmark text:name="_qson8mdl6pci"/>Abstract</text:p>
      <text:p text:style-name="Standard">In agriculture one of the challenges consists of the detection and isolation of diseased plants. Through computer vision, this process can be automated, reducing the losses of sick crops. In this work, have been developed Convolutional Neural Networks (CNNs) machine learning models to identify and detect sick plants. For this end, the following models have been developed: ResNet50, EfficientNetV2S and GoogleNet.</text:p>
      <text:p text:style-name="Heading_20_1"><text:bookmark text:name="_5cq331xu21we"/>Resumo</text:p>
      <text:p text:style-name="Standard">Na agricultura um dos desafios encontrados consiste na detecção e isolamento de plantas doentes. Através da visão computacional, esse processo pode ser automatizado, podendo reduzir as perdas resultantes de culturas doentes. Neste trabalho, foram desenvolvidos modelos de aprendizado de máquina utilizando Redes Neurais Convolucionais (CNNs) visando a detecção de plantas doentes. Para isso foram desenvolvidos os seguintes modelos: ResNet50, EfficientNetV2S e GoogleNet.</text:p>
      <text:p text:style-name="Heading_20_1"><text:bookmark text:name="_g3chujy5c97p"/>Introdução</text:p>
      <text:p text:style-name="Standard">Um dos desafios encontrados na agricultura moderna consiste na identificação, detecção e isolamento de culturas de plantas doentes, tendo em vista que a doença pode se espalhar, resultando na contaminação de toda a produção agrícola. Dessa forma, a detecção automatizada de plantas doentes pode resultar no aumento na quantidade e na qualidade da produção agrícola, portanto reduzindo as perdas.</text:p>
      <text:p text:style-name="Standard"/>
      <text:p text:style-name="Standard">Este trabalho tem como objetivo o desenvolvimento de um modelo de rede neural convolucional capaz de utilizar a visão computacional para identificar e classificar doenças em plantas. Dessa forma, agricultores poderão utilizar esse modelo para a automatização de identificação dessas doenças, impedindo que as suas culturas sofram perdas.</text:p>
      <text:p text:style-name="Heading_20_1"><text:bookmark text:name="_5gqzo0dblcls"/>Trabalhos Relacionados</text:p>
      <text:p text:style-name="Standard">Em [2], foi proposto o desenvolvimento de uma plataforma chamada “FarmEasy” na qual possui capacidade de detectar e classificar doenças de plantas. Para isso, foi utilizado o dataset New Plant Disease Dataset, que possuí 87867 imagens (70295 imagens de teste e 17572 imagens de treino) associadas a doenças de plantas. Esse dataset foi utilizado para treinar e testar os modelos VGG16, Inception v3 e ResNet50.</text:p>
      <text:p text:style-name="Standard"/>
      <text:p text:style-name="Standard">Bahaa S. Hamed, Mahmoud M. Hussein, Afaf M. Mousa em [1] propuseram o desenvolvimento de uma rede neural convolucional EfficientNetV2S para a classificação de doenças em plantas. Para isso, eles também utilizaram o dataset New Plant Disease Dataset no qual aplicaram uma série de modificações visando a tornar o modelo resiliente a ruídos.</text:p>
      <text:p text:style-name="Heading_20_1"><text:bookmark text:name="_icmdiisw8eb5"/>Metodologia</text:p>
      <text:p text:style-name="Heading_20_2"><text:bookmark text:name="_41rtyx42q5un"/>Dataset</text:p>
      <text:p text:style-name="Standard">Para o desenvolvimento deste trabalho, foi utilizado o Plant Village Dataset, o qual possuí 38 classes de doenças em plantas, incluindo classes de plantas saudáveis. A escolha deste dataset se deu pelo fato dele ser um dataset utilizado para a classificação de doenças de plantas.</text:p>
      <text:p text:style-name="Heading_20_2"><text:bookmark text:name="_cj8zcdf4wem0"/>Pré-Processamento</text:p>
      <text:p text:style-name="Standard">Visando a facilitar o treinamento do modelo, foi gerado uma tabela no formato de arquivo CSV contendo os seguintes atributos: os nomes dos arquivos de imagem; a versão desse arquivo: color, grayscale e segmented; a classe; o tipo de planta; e o tipo de doença. Através dessa tabela, foi possível realizar a separação dos conjuntos de treino e teste que foram utilizados no treinamento dos modelos. A separação do conjunto de treino e de teste foi feita pela função ‘train_test_split’, à qual foi definido como critério de separação a margem de 20% para o conjunto de teste, além do estado randômico com o valor 1024.</text:p>
      <text:p text:style-name="Heading_20_2"><text:bookmark text:name="_a1vmy5lbaq2k"/>Modelos</text:p>
      <text:p text:style-name="Standard">Neste trabalho foram utilizados os seguintes modelos: ResNet50, EfficientNetV2S e GoogleNet. A escolha dos modelos ResNet50 e EfficientNet se deu pelo fato de nos trabalhos relacionados analisados, esse datasets foram utilizados para o treinamento do modelo de rede neural convolucional. Dessa forma, o GoogleNet foi escolhido para ser o modelo a ser comparado com o EfficientNet e o ResNet50.</text:p>
      <text:p text:style-name="Heading_20_1"><text:bookmark text:name="_knuv8b50xujl"/>Resultados</text:p>
      <text:p text:style-name="Standard"/>
      <text:p text:style-name="Heading_20_1"><text:bookmark text:name="_pt9qkpg98xnz"/>Conclusão</text:p>
      <text:p text:style-name="Standard"/>
      <text:p text:style-name="Heading_20_1"><text:bookmark text:name="_rsmiiq3qsvt8"/>Referências</text:p>
      <text:p text:style-name="Standard"><text:soft-page-break/>[1] HAMED, Bahaa S.; HUSSEIN, Mahmoud M.; MOUSA, Afaf M. Plant disease detection using deep learning. International Journal of Intelligent Systems and Applications, v. 15, n. 6, p. 38-50, 2023.</text:p>
      <text:p text:style-name="Standard"/>
      <text:p text:style-name="Standard">[2] P. Pandey, K. Patyane, M. Padekar, R. Mohite, P. Mane and A. Avhad, "Plant Disease Detection Using Deep Learning Model - Application FarmEasy," 2023 International Conference on Advanced Computing Technologies and Applications (ICACTA), Mumbai, India, 2023, pp. 1-6, doi: 10.1109/ICACTA58201.2023.10393095. keywords: {Deep learning;Training;Plant diseases;Computer vision;Machine learning algorithms;Automation;Manuals;Machine learning;Plant disease;Image analysis;Convolutional neural networks;Disease detection;Precision agriculture;Feature extraction},</text:p>
      <text:p text:style-name="Standard"/>
      <text:p text:style-name="Standard">[3] PLANTVILLAGE Dataset. Kaggle, 2019. Disponível em: https://www.kaggle.com/datasets/abdallahalidev/plantvillage-dataset. Acesso em: 18 jun. 20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4" meta:word-count="677" meta:character-count="4747" meta:non-whitespace-character-count="4094"/>
    <meta:generator>LibreOfficeDev/6.0.5.2$Linux_X86_64 LibreOffice_project/</meta:generator>
  </office:meta>
</office:document-meta>
</file>