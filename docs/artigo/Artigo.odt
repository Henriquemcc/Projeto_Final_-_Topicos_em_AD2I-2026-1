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9444in" fo:margin-top="0in" fo:margin-bottom="0in" table:align="center"/>
    </style:style>
    <style:style style:name="Table1.A" style:family="table-column">
      <style:table-column-properties style:column-width="6.944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9444in" fo:margin-top="0in" fo:margin-bottom="0in" table:align="center"/>
    </style:style>
    <style:style style:name="Table2.A" style:family="table-column">
      <style:table-column-properties style:column-width="6.944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9444in" fo:margin-top="0in" fo:margin-bottom="0in" table:align="center"/>
    </style:style>
    <style:style style:name="Table3.A" style:family="table-column">
      <style:table-column-properties style:column-width="6.9444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9444in" fo:margin-top="0in" fo:margin-bottom="0in" fo:break-before="auto" fo:break-after="auto" table:align="center"/>
    </style:style>
    <style:style style:name="Table4.A" style:family="table-column">
      <style:table-column-properties style:column-width="6.944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9444in" fo:margin-top="0in" fo:margin-bottom="0in" fo:break-before="auto" fo:break-after="auto" table:align="center"/>
    </style:style>
    <style:style style:name="Table5.A" style:family="table-column">
      <style:table-column-properties style:column-width="6.9444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Title"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2no8pyrzsqq"/>Classificação de Imagens de Plantas Doentes utilizando Visão Computacional</text:p>
      <text:p text:style-name="Heading_20_1"><text:bookmark text:name="_qson8mdl6pci"/>Abstract</text:p>
      <text:p text:style-name="Standard">In agriculture one of the challenges consists of the detection and isolation of diseased plants. Through computer vision, this process can be automated, reducing the losses of sick crops. In this work, have been developed Convolutional Neural Networks (CNNs) machine learning models to identify and detect sick plants. For this end, the following models have been developed: ResNet50, EfficientNetV2S and GoogleNet.</text:p>
      <text:p text:style-name="Heading_20_1"><text:bookmark text:name="_5cq331xu21we"/>Resumo</text:p>
      <text:p text:style-name="Standard">Na agricultura um dos desafios encontrados consiste na detecção e isolamento de plantas doentes. Através da visão computacional, esse processo pode ser automatizado, podendo reduzir as perdas resultantes de culturas doentes. Neste trabalho, foram desenvolvidos modelos de aprendizado de máquina utilizando Redes Neurais Convolucionais (CNNs) visando a detecção de plantas doentes. Para isso foram desenvolvidos os seguintes modelos: ResNet50, EfficientNetV2S e GoogleNet.</text:p>
      <text:p text:style-name="Heading_20_1"><text:bookmark text:name="_g3chujy5c97p"/>Introdução</text:p>
      <text:p text:style-name="Standard">Um dos desafios encontrados na agricultura moderna consiste na identificação, detecção e isolamento de culturas de plantas doentes, tendo em vista que a doença pode se espalhar, resultando na contaminação de toda a produção agrícola. Dessa forma, a detecção automatizada de plantas doentes pode resultar no aumento na quantidade e na qualidade da produção agrícola, portanto reduzindo as perdas.</text:p>
      <text:p text:style-name="Standard"/>
      <text:p text:style-name="Standard">Este trabalho tem como objetivo o desenvolvimento de um modelo de rede neural convolucional capaz de utilizar a visão computacional para identificar e classificar doenças em plantas. Dessa forma, agricultores poderão utilizar esse modelo para a automatização de identificação dessas doenças, impedindo que as suas culturas sofram perdas.</text:p>
      <text:p text:style-name="Heading_20_1"><text:bookmark text:name="_5gqzo0dblcls"/>Trabalhos Relacionados</text:p>
      <text:p text:style-name="Standard">Em [2], foi proposto o desenvolvimento de uma plataforma chamada “FarmEasy” na qual possui capacidade de detectar e classificar doenças de plantas. Para isso, foi utilizado o dataset New Plant Disease Dataset, que possuí 87867 imagens (70295 imagens de teste e 17572 imagens de treino) associadas a doenças de plantas. Esse dataset foi utilizado para treinar e testar os modelos VGG16, Inception v3 e ResNet50.</text:p>
      <text:p text:style-name="Standard"/>
      <text:p text:style-name="Standard">Bahaa S. Hamed, Mahmoud M. Hussein, Afaf M. Mousa em [1] propuseram o desenvolvimento de uma rede neural convolucional EfficientNetV2S para a classificação de doenças em plantas. Para isso, eles também utilizaram o dataset New Plant Disease Dataset no qual aplicaram uma série de modificações visando a tornar o modelo resiliente a ruídos.</text:p>
      <text:p text:style-name="Heading_20_1"><text:bookmark text:name="_icmdiisw8eb5"/>Metodologia</text:p>
      <text:p text:style-name="Heading_20_2"><text:bookmark text:name="_41rtyx42q5un"/>Dataset</text:p>
      <text:p text:style-name="Standard">Para o desenvolvimento deste trabalho, foi utilizado o Plant Village Dataset, o qual possuí 38 classes de doenças em plantas, incluindo classes de plantas saudáveis. A escolha deste dataset se deu pelo fato dele ser um dataset utilizado para a classificação de doenças de plantas.</text:p>
      <text:p text:style-name="Heading_20_2"><text:bookmark text:name="_cj8zcdf4wem0"/>Pré-Processamento</text:p>
      <text:p text:style-name="Standard">Visando a facilitar o treinamento do modelo, foi gerado uma tabela no formato de arquivo CSV contendo os seguintes atributos: os nomes dos arquivos de imagem; a versão desse arquivo: color, grayscale e segmented; a classe; o tipo de planta; e o tipo de doença. Através dessa tabela, foi possível realizar a separação dos conjuntos de treino e teste que foram utilizados no treinamento dos modelos. A separação do conjunto de treino e de teste foi feita pela função ‘train_test_split’, à qual foi definido como critério de separação a margem de 20% para o conjunto de teste, além do estado randômico com o valor 1024.</text:p>
      <text:p text:style-name="Heading_20_2"><text:bookmark text:name="_a1vmy5lbaq2k"/>Modelos</text:p>
      <text:p text:style-name="Standard">Neste trabalho foram utilizados os seguintes modelos: ResNet50, EfficientNetV2S e GoogleNet. A escolha dos modelos ResNet50 e EfficientNet se deu pelo fato de nos trabalhos relacionados analisados, esses modelos foram utilizados para o treinamento da rede neural convolucional. Dessa forma, o GoogleNet foi escolhido para ser o modelo a ser comparado com o EfficientNet e o ResNet.</text:p>
      <text:p text:style-name="Standard"><text:soft-page-break/></text:p>
      <table:table table:name="Table1" table:style-name="Table1">
        <table:table-column table:style-name="Table1.A"/>
        <table:table-row table:style-name="Table1.1">
          <table:table-cell table:style-name="Table1.A1" office:value-type="string">
            <text:p text:style-name="P1">import tensorflow as tf</text:p>
            <text:p text:style-name="P1">from sklearn.model_selection import train_test_split</text:p>
            <text:p text:style-name="P1">from sklearn.preprocessing import LabelEncoder</text:p>
            <text:p text:style-name="P1">from tensorflow.keras.callbacks import EarlyStopping, ModelCheckpoint</text:p>
            <text:p text:style-name="P1"/>
            <text:p text:style-name="P1">...</text:p>
            <text:p text:style-name="P1"/>
            <text:p text:style-name="P1"># Construindo modelo ResNet50</text:p>
            <text:p text:style-name="P1">base_model = tf.keras.applications.ResNet50(</text:p>
            <text:p text:style-name="P1"><text:s text:c="4"/>weights = 'imagenet',</text:p>
            <text:p text:style-name="P1"><text:s text:c="4"/>include_top=False,</text:p>
            <text:p text:style-name="P1"><text:s text:c="4"/>input_shape=(224, 224, 3)</text:p>
            <text:p text:style-name="P1">)</text:p>
            <text:p text:style-name="P1"/>
            <text:p text:style-name="P1"># Congelando as camadas base para nao serem atualizadas no primeiro momento</text:p>
            <text:p text:style-name="P1">base_model.trainable = False </text:p>
            <text:p text:style-name="P1"/>
            <text:p text:style-name="P1"># Construindo modelo final</text:p>
            <text:p text:style-name="P1">inputs = tf.keras.Input(shape=(224, 224, 3)) </text:p>
            <text:p text:style-name="P1"/>
            <text:p text:style-name="P1">x = base_model(inputs, training=False)</text:p>
            <text:p text:style-name="P1">x = tf.keras.layers.GlobalAveragePooling2D()(x)</text:p>
            <text:p text:style-name="P1">x = tf.keras.layers.Dropout(0.2)(x)</text:p>
            <text:p text:style-name="P1"/>
            <text:p text:style-name="P1"># Camada de saida com neurônios igual ao número de classes</text:p>
            <text:p text:style-name="P1">outputs = tf.keras.layers.Dense(num_classes, activation='softmax')(x)</text:p>
            <text:p text:style-name="P1"/>
            <text:p text:style-name="P1"># Construindo modelo</text:p>
            <text:p text:style-name="P1">model = tf.keras.Model(inputs, outputs)</text:p>
            <text:p text:style-name="P1"/>
            <text:p text:style-name="P1">...</text:p>
          </table:table-cell>
        </table:table-row>
      </table:table>
      <text:p text:style-name="Standard">Código fonte da construção do modelo ResNet 50</text:p>
      <text:p text:style-name="Standard"/>
      <text:p text:style-name="Standard">Um aspecto fundamental no desenvolvimento dos modelos foi o uso da biblioteca Tensorflow. Através dela foi possível utilizar os modelos pré-existentes ResNet50 e EfficientNetV2S. Dessa forma, não foi necessário implementar manualmente esses modelos.</text:p>
      <text:p text:style-name="Standard"/>
      <text:p text:style-name="Standard">Em relação aos valores iniciais para os pesos dos modelos, foram utilizados os valores da ImageNet. Dessa forma, através do aprendizado por transferência, foi possível economizar tempo no treinamento dos modelos.</text:p>
      <text:p text:style-name="Standard"/>
      <text:p text:style-name="Standard"/>
      <table:table table:name="Table2" table:style-name="Table2">
        <table:table-column table:style-name="Table2.A"/>
        <table:table-row table:style-name="Table2.1">
          <table:table-cell table:style-name="Table2.A1" office:value-type="string">
            <text:p text:style-name="P1">import tensorflow as tf</text:p>
            <text:p text:style-name="P1">from tensorflow.keras.callbacks import EarlyStopping, ModelCheckpoint</text:p>
            <text:p text:style-name="P1">from tensorflow.keras.applications import EfficientNetV2S</text:p>
            <text:p text:style-name="P1">from tensorflow.keras import models, layers</text:p>
            <text:p text:style-name="P1"/>
            <text:p text:style-name="P1">...</text:p>
            <text:p text:style-name="P1"/>
            <text:p text:style-name="P1"># Construindo modelo EfficientNetV2S</text:p>
            <text:p text:style-name="P1">base_model = EfficientNetV2S(</text:p>
            <text:p text:style-name="P1"><text:s text:c="4"/>include_top=False,</text:p>
            <text:p text:style-name="P1"><text:s text:c="4"/>weights='imagenet',</text:p>
            <text:p text:style-name="P1"><text:s text:c="4"/>input_shape=(224, 224, 3)</text:p>
            <text:p text:style-name="P1">)</text:p>
            <text:p text:style-name="P1"/>
            <text:p text:style-name="P1"># Congelando as camadas base para nao serem atualizadas no primeiro momento</text:p>
            <text:p text:style-name="P1">base_model.treinable = False</text:p>
            <text:p text:style-name="P1"/>
            <text:p text:style-name="P1"># Construindo o modelo sequencial adicionando a base e as novas camadas de classificaçao</text:p>
            <text:p text:style-name="P1">model = models.Sequential([</text:p>
            <text:p text:style-name="P1"><text:s text:c="4"/>base_model,</text:p>
            <text:p text:style-name="P1"><text:s text:c="4"/>layers.GlobalAveragePooling2D(),</text:p>
            <text:p text:style-name="P1"><text:s text:c="4"/>layers.Dropout(0.2),</text:p>
            <text:p text:style-name="P1"><text:s text:c="4"/>layers.Dense(num_classes, activation='softmax')</text:p>
            <text:p text:style-name="P1">])</text:p>
            <text:p text:style-name="P1"/>
            <text:p text:style-name="P1">...</text:p>
          </table:table-cell>
        </table:table-row>
      </table:table>
      <text:p text:style-name="Standard">Código fonte da construção do modelo EfficientNetV2S</text:p>
      <text:p text:style-name="Standard"/>
      <text:p text:style-name="Standard">Em relação ao modelo GoogleNet, este teve de ser implementado manualmente, tendo em vista que o Tensotflow não possuí este modelo pronto. Dessa forma, foram desenvolvidas as seguintes funções: inception_module, na qual realiza parte da convoluções realizadas pelo modelo; <text:s/>auxiliary_classifier, na qual realiza a classificação auxiliar do modelo; e build_googlenet, que finalmente realiza a construção do modelo.</text:p>
      <text:p text:style-name="Standard"/>
      <text:p text:style-name="Standard"/>
      <table:table table:name="Table3" table:style-name="Table3">
        <table:table-column table:style-name="Table3.A"/>
        <table:table-row table:style-name="Table3.1">
          <table:table-cell table:style-name="Table3.A1" office:value-type="string">
            <text:p text:style-name="P1">import tensorflow as tf</text:p>
            <text:p text:style-name="P1">from tensorflow.keras.callbacks import EarlyStopping, ModelCheckpoint</text:p>
            <text:p text:style-name="P1">from tensorflow.keras.layers import (Conv2D, MaxPooling2D, AveragePooling2D, Dropout, Dense, Flatten, Input, concatenate)</text:p>
            <text:p text:style-name="P1">from tensorflow.keras.models import Model</text:p>
            <text:p text:style-name="P1"/>
            <text:p text:style-name="P1">...</text:p>
            <text:p text:style-name="P1"/>
            <text:p text:style-name="P1"># Construindo modelo GoogleNet</text:p>
            <text:p text:style-name="P1">def inception_module(x, filters_1x1, filters_3x3_reduce, filters_3x3, filters_5x5_reduce, filters_5x5, filters_pool_proj, name=None):</text:p>
            <text:p text:style-name="P1"><text:s text:c="4"/># Ramo 1: Convolucao 1x1</text:p>
            <text:p text:style-name="P1"><text:s text:c="4"/>path1 = Conv2D(filters_1x1, (1, 1), padding='same', activation='relu', name=f'{name}_1x1')(x)</text:p>
            <text:p text:style-name="P1"/>
            <text:p text:style-name="P1"><text:s text:c="4"/># Ramo 2: Convolucao 1x1 -&gt; Convolucao 3x3</text:p>
            <text:p text:style-name="P1"><text:s text:c="4"/>path2 = Conv2D(filters_3x3_reduce, (1, 1), padding='same', activation='relu', name=f'{name}_3x3_reduce')(x)</text:p>
            <text:p text:style-name="P1"><text:s text:c="4"/>path2 = Conv2D(filters_3x3, (3, 3), padding='same', activation='relu', name=f'{name}_3x3')(path2)</text:p>
            <text:p text:style-name="P1"/>
            <text:p text:style-name="P1"><text:s text:c="4"/># Ramo 3: Convolucao 1x1 -&gt; Convolucao 5x5</text:p>
            <text:p text:style-name="P1"><text:s text:c="4"/>path3 = Conv2D(filters_5x5_reduce, (1, 1), padding='same', activation='relu', name=f'{name}_5x5_reduce')(x)</text:p>
            <text:p text:style-name="P1"><text:s text:c="4"/>path3 = Conv2D(filters_5x5, (5, 5), padding='same', activation='relu', name=f'{name}_5x5')(path3)</text:p>
            <text:p text:style-name="P1"/>
            <text:p text:style-name="P1"><text:s text:c="4"/># Ramo 4: MaxPool 3x3 -&gt; Convolucao 1x1</text:p>
            <text:p text:style-name="P1"><text:s text:c="4"/>path4 = MaxPooling2D((3, 3), strides=(1, 1), padding='same', name=f'{name}_pool')(x)</text:p>
            <text:p text:style-name="P1"><text:s text:c="4"/>path4 = Conv2D(filters_pool_proj, (1, 1), padding='same', activation='relu', name=f'{name}_pool_proj')(path4)</text:p>
            <text:p text:style-name="P1"/>
            <text:p text:style-name="P1"><text:s text:c="4"/># Concatenacao dos ramos na dimensao dos canais</text:p>
            <text:p text:style-name="P1"><text:s text:c="4"/>return concatenate([path1, path2, path3, path4], axis=-1, name=name)</text:p>
            <text:p text:style-name="P1"/>
            <text:p text:style-name="P1">def auxiliary_classifier(x, name, num_classes):</text:p>
            <text:p text:style-name="P1"><text:s text:c="4"/># Reducao espacial</text:p>
            <text:p text:style-name="P1"><text:s text:c="4"/>x = AveragePooling2D((5, 5), strides=(3, 3), name=f'{name}_avgpool')(x)</text:p>
            <text:p text:style-name="P1"><text:s text:c="4"/>x = Conv2D(128, (1, 1), padding='same', activation='relu', name=f'{name}_conv')(x)</text:p>
            <text:p text:style-name="P1"><text:s text:c="4"/>x = Flatten(name=f'{name}_flatten')(x)</text:p>
            <text:p text:style-name="P1"><text:s text:c="4"/>x = Dense(1024, activation='relu', name=f'{name}_fc')(x)</text:p>
            <text:p text:style-name="P1"><text:s text:c="4"/>x = Dropout(0.7, name=f'{name}_dropout')(x)</text:p>
            <text:p text:style-name="P1"><text:s text:c="4"/>x = Dense(num_classes, activation='softmax', name=f'{name}_output')(x)</text:p>
            <text:p text:style-name="P1"><text:s text:c="4"/></text:p>
            <text:p text:style-name="P1"><text:s text:c="4"/>return x</text:p>
            <text:p text:style-name="P1"/>
            <text:p text:style-name="P1">def build_googlenet(input_shape, num_classes):</text:p>
            <text:p text:style-name="P1"><text:s text:c="4"/>input_layer = Input(shape=input_shape)</text:p>
            <text:p text:style-name="P1"/>
            <text:p text:style-name="P1"><text:s text:c="4"/># Estagio 1</text:p>
            <text:p text:style-name="P1"><text:s text:c="4"/>x = Conv2D(64, (7, 7), strides=(2, 2), padding='same', activation='relu', name='conv1_7x7')(input_layer)</text:p>
            <text:p text:style-name="P1"><text:s text:c="4"/>x = MaxPooling2D((3, 3), strides=(2, 2), padding='same', name='maxpool1_3x3')(x)</text:p>
            <text:p text:style-name="P1"/>
            <text:p text:style-name="P1"><text:s text:c="4"/># Estagio 2</text:p>
            <text:p text:style-name="P1"><text:s text:c="4"/>x = Conv2D(64, (1, 1), padding='same', activation='relu', name='conv2_1x1')(x)</text:p>
            <text:p text:style-name="P1"><text:s text:c="4"/>x = Conv2D(192, (3, 3), padding='same', activation='relu', name='conv2_3x3')(x)</text:p>
            <text:p text:style-name="P1"><text:s text:c="4"/>x = MaxPooling2D((3, 3), strides=(2, 2), padding='same', name='maxpool2_3x3')(x)</text:p>
            <text:p text:style-name="P1"/>
            <text:p text:style-name="P1"><text:s text:c="4"/># Estagio 3 (Inception 3a e 3b)</text:p>
            <text:p text:style-name="P1"><text:s text:c="4"/>x = inception_module(x, 64, 96, 128, 16, 32, 32, name='inception_3a')</text:p>
            <text:p text:style-name="P1"><text:s text:c="4"/>x = inception_module(x, 128, 128, 192, 32, 96, 64, name='inception_3b')</text:p>
            <text:p text:style-name="P1"><text:s text:c="4"/>x = MaxPooling2D((3, 3), strides=(2, 2), padding='same', name='maxpool3_3x3')(x)</text:p>
            <text:p text:style-name="P1"/>
            <text:p text:style-name="P1"><text:s text:c="4"/># Estagio 4 (Inception 4a a 4e) + Classificador Auxiliar 1</text:p>
            <text:p text:style-name="P1"><text:s text:c="4"/>x = inception_module(x, 192, 96, 208, 16, 48, 64, name='inception_4a')</text:p>
            <text:p text:style-name="P1"><text:s text:c="4"/>aux1 = auxiliary_classifier(x, name='aux1', num_classes=num_classes)</text:p>
            <text:p text:style-name="P1"/>
            <text:p text:style-name="P1"><text:s text:c="4"/>x = inception_module(x, 160, 112, 224, 24, 64, 64, name='inception_4b')</text:p>
            <text:p text:style-name="P1"><text:s text:c="4"/>x = inception_module(x, 128, 128, 256, 24, 64, 64, name='inception_4c')</text:p>
            <text:p text:style-name="P1"><text:s text:c="4"/>x = inception_module(x, 112, 144, 288, 32, 64, 64, name='inception_4d')</text:p>
            <text:p text:style-name="P1"><text:s text:c="4"/>aux2 = auxiliary_classifier(x, name='aux2', num_classes=num_classes)</text:p>
            <text:p text:style-name="P1"/>
            <text:p text:style-name="P1"><text:s text:c="4"/>x = inception_module(x, 256, 160, 320, 32, 128, 128, name='inception_4e')</text:p>
            <text:p text:style-name="P1"><text:s text:c="4"/>x = MaxPooling2D((3, 3), strides=(2, 2), padding='same', name='maxpool4_3x3')(x)</text:p>
            <text:p text:style-name="P1"/>
            <text:p text:style-name="P1"><text:s text:c="4"/># Estagio 5 (Inception 5a e 5b)</text:p>
            <text:p text:style-name="P1"><text:s text:c="4"/>x = inception_module(x, 256, 160, 320, 32, 128, 128, name='inception_5a')</text:p>
            <text:p text:style-name="P1"><text:s text:c="4"/>x = inception_module(x, 384, 192, 384, 48, 128, 128, name='inception_5b')</text:p>
            <text:p text:style-name="P1"/>
            <text:p text:style-name="P1"><text:s text:c="4"/># Classificador principal</text:p>
            <text:p text:style-name="P1"><text:s text:c="4"/>x = AveragePooling2D((7, 7), strides=(1, 1), name='global_avg_pool')(x)</text:p>
            <text:p text:style-name="P1"><text:s text:c="4"/>x = Flatten(name='final_flatten')(x)</text:p>
            <text:p text:style-name="P1"><text:s text:c="4"/>main_output = Dense(num_classes, activation='softmax', name='main_output')(x)</text:p>
            <text:p text:style-name="P1"/>
            <text:p text:style-name="P1"><text:s text:c="4"/># O modelo retorna 3 saidas (1 principal e 2 auxiliares)</text:p>
            <text:p text:style-name="P1"><text:s text:c="4"/>model = Model(inputs=input_layer, outputs=[main_output, aux1, aux2], name='GoogleNet')</text:p>
            <text:p text:style-name="P1"><text:s text:c="4"/>return model</text:p>
            <text:p text:style-name="P1"/>
            <text:p text:style-name="P1"/>
            <text:p text:style-name="P1"># Construindo modelo</text:p>
            <text:p text:style-name="P1">model = build_googlenet(input_shape=(224, 224, 3), num_classes=num_classes)</text:p>
            <text:p text:style-name="P1"/>
            <text:p text:style-name="P1">...</text:p>
          </table:table-cell>
        </table:table-row>
      </table:table>
      <text:p text:style-name="Standard">Código fonte da construção do modelo</text:p>
      <text:p text:style-name="Standard"/>
      <text:p text:style-name="Standard">Outro aspecto fundamental para o treinamento dos modelos foi o desenvolvimento de calbacks para os modelos. Dessa forma, durante o processo de treinamento, o treinamento era interrompido para: checar se houve melhoria em relação ao modelo anterior, podendo abreviar o treinamento caso não tenha ocorrido nenhuma melhoria; e salvamento automático, possibilitando recuperar o modelo em caso de queda de energia ou interrupção durante o treinamento.</text:p>
      <text:p text:style-name="Standard"/>
      <text:p text:style-name="Standard"/>
      <table:table table:name="Table4" table:style-name="Table4">
        <table:table-column table:style-name="Table4.A"/>
        <text:soft-page-break/>
        <table:table-row table:style-name="Table4.1">
          <table:table-cell table:style-name="Table4.A1" office:value-type="string">
            <text:p text:style-name="P2"># Adicionando callback para parar o treino mais cedo caso o modelo pare de melhorar</text:p>
            <text:p text:style-name="P2">early_stopping = EarlyStopping(</text:p>
            <text:p text:style-name="P2"><text:s text:c="4"/>monitor='val_loss', patience=5, restore_best_weights=True</text:p>
            <text:p text:style-name="P2">)</text:p>
          </table:table-cell>
        </table:table-row>
      </table:table>
      <text:p text:style-name="Standard">Código fonte do callback de abreviação do treinamento em caso de não haver melhora</text:p>
      <text:p text:style-name="Standard"/>
      <text:p text:style-name="Standard"/>
      <table:table table:name="Table5" table:style-name="Table5">
        <table:table-column table:style-name="Table5.A"/>
        <table:table-row table:style-name="Table5.1">
          <table:table-cell table:style-name="Table5.A1" office:value-type="string">
            <text:p text:style-name="P2"># Criando o callback para salvar o melhor modelo</text:p>
            <text:p text:style-name="P2">checkpoint_callback = ModelCheckpoint(</text:p>
            <text:p text:style-name="P2"><text:s text:c="4"/>filepath='modelo_resnet50_plantvillage.keras', # Nome do arquivo a ser salvo</text:p>
            <text:p text:style-name="P2"><text:s text:c="4"/>monitor='val_loss', <text:s text:c="21"/># Monitora a perda da validação</text:p>
            <text:p text:style-name="P2"><text:s text:c="4"/>save_best_only=True, <text:s text:c="20"/># Salva apenas se melhorar (sobrescreve o anterior)</text:p>
            <text:p text:style-name="P2"><text:s text:c="4"/>save_weights_only=False, <text:s text:c="16"/># Salva a arquitetura + pesos + otimizador</text:p>
            <text:p text:style-name="P2"><text:s text:c="4"/>mode='min', <text:s text:c="29"/># 'min' porque queremos que a perda diminua</text:p>
            <text:p text:style-name="P2"><text:s text:c="4"/>verbose=1 <text:s text:c="31"/># Mostra no console quando salvar</text:p>
            <text:p text:style-name="P2">)</text:p>
          </table:table-cell>
        </table:table-row>
      </table:table>
      <text:p text:style-name="Standard">Código fonte do callback de salvamento automático do modelo</text:p>
      <text:p text:style-name="Heading_20_1"><text:bookmark text:name="_knuv8b50xujl"/>Resultados</text:p>
      <text:p text:style-name="Standard"/>
      <text:p text:style-name="Heading_20_1"><text:bookmark text:name="_pt9qkpg98xnz"/>Conclusão</text:p>
      <text:p text:style-name="Standard"/>
      <text:p text:style-name="Heading_20_1"><text:bookmark text:name="_rsmiiq3qsvt8"/>Referências</text:p>
      <text:p text:style-name="Standard">[1] HAMED, Bahaa S.; HUSSEIN, Mahmoud M.; MOUSA, Afaf M. Plant disease detection using deep learning. International Journal of Intelligent Systems and Applications, v. 15, n. 6, p. 38-50, 2023.</text:p>
      <text:p text:style-name="Standard"/>
      <text:p text:style-name="Standard">[2] P. Pandey, K. Patyane, M. Padekar, R. Mohite, P. Mane and A. Avhad, "Plant Disease Detection Using Deep Learning Model - Application FarmEasy," 2023 International Conference on Advanced Computing Technologies and Applications (ICACTA), Mumbai, India, 2023, pp. 1-6, doi: 10.1109/ICACTA58201.2023.10393095. keywords: {Deep learning;Training;Plant diseases;Computer vision;Machine learning algorithms;Automation;Manuals;Machine learning;Plant disease;Image analysis;Convolutional neural networks;Disease detection;Precision agriculture;Feature extraction},</text:p>
      <text:p text:style-name="Standard"/>
      <text:p text:style-name="Standard">[3] PLANTVILLAGE Dataset. Kaggle, 2019. Disponível em: https://www.kaggle.com/datasets/abdallahalidev/plantvillage-dataset. Acesso em: 18 jun. 20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155" meta:word-count="1572" meta:character-count="12675" meta:non-whitespace-character-count="10857"/>
    <meta:generator>LibreOfficeDev/6.0.5.2$Linux_X86_64 LibreOffice_project/</meta:generator>
  </office:meta>
</office:document-meta>
</file>