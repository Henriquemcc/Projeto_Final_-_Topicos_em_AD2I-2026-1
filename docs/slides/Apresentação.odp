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733B38EABE1D50AF30F.png" manifest:media-type="image/png"/>
  <manifest:file-entry manifest:full-path="Pictures/100002010000073800000800C066304AA9F845FD.png" manifest:media-type="image/png"/>
  <manifest:file-entry manifest:full-path="Pictures/100002010000080000000635B9FA407A51953CEC.png" manifest:media-type="image/png"/>
  <manifest:file-entry manifest:full-path="Pictures/100002010000080000000733CA5F4863B2A902FE.png" manifest:media-type="image/png"/>
  <manifest:file-entry manifest:full-path="Pictures/1000020100000800000007336612B48C54D6B7B2.png" manifest:media-type="image/png"/>
  <manifest:file-entry manifest:full-path="Pictures/10000201000007AC000005F4AB7892A3A5885A94.png" manifest:media-type="image/png"/>
  <manifest:file-entry manifest:full-path="Pictures/1000020100000694000007029A7A8E10873E1A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4cm, 0cm, 0.179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Classificação de Imagens de Plantas Doentes utilizando Visão Computacional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Henrique Mendonça Castelar Campos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Google Shape;93;p14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Um dos desafios encontrados na agricultura moderna consiste na identificação, detecção e isolamento de culturas de plantas doentes, visto que a doença pode se espalhar, resultando na contaminação de toda a produção agrícola</text:span></text:p>
            <text:p text:style-name="P7"><text:span text:style-name="T4">Este trabalho tem como objetivo o desenvolvimento de um modelo de rede neural convolucional capaz de utilizar visão computacional para ajudar a identificar plantas doentes.</text:span></text:p>
          </draw:text-box>
        </draw:frame>
        <presentation:notes draw:style-name="dp2">
          <draw:page-thumbnail draw:name="Google Shape;89;g3f0a8ea28b7_0_0:notes" draw:style-name="gr1" draw:layer="layout" svg:width="16.932cm" svg:height="9.524cm" svg:x="1.059cm" svg:y="1.905cm" draw:page-number="2" presentation:class="page"/>
          <draw:frame draw:name="Google Shape;90;g3f0a8ea28b7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Relacionados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Trabalhos Relacionados</text:span></text:p>
          </draw:text-box>
        </draw:frame>
        <draw:frame draw:name="Google Shape;99;p1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9"><text:span text:style-name="T4">Bahaa S. Hamed, Mahmoud M. Hussein, Afaf M. Mousa em [1] propuseram o desenvolvimento de uma rede neural convolucional EfficientNetV2S para a classificação de doenças em plantas.</text:span></text:p>
              </text:list-item>
              <text:list-item>
                <text:p text:style-name="P9"><text:span text:style-name="T4">Em [2], foi proposto o desenvolvimento de uma plataforma chamada </text:span><text:span text:style-name="T4"><text:line-break/></text:span><text:span text:style-name="T4">“FarmEasy” na qual possui capacidade de detectar e classificar doenças de plantas.</text:span></text:p>
              </text:list-item>
            </text:list>
          </draw:text-box>
        </draw:frame>
        <presentation:notes draw:style-name="dp2">
          <draw:page-thumbnail draw:name="Google Shape;95;g3f0a8ea28b7_0_5:notes" draw:style-name="gr1" draw:layer="layout" svg:width="16.932cm" svg:height="9.524cm" svg:x="1.059cm" svg:y="1.905cm" draw:page-number="3" presentation:class="page"/>
          <draw:frame draw:name="Google Shape;96;g3f0a8ea28b7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" draw:style-name="dp1" draw:master-page-name="TITLE_5f_AND_5f_BODY" presentation:presentation-page-layout-name="AL2T1">
        <draw:frame draw:name="Google Shape;104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</text:span></text:p>
          </draw:text-box>
        </draw:frame>
        <draw:frame draw:name="Google Shape;105;p16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Dataset:</text:span></text:p>
            <text:list text:style-name="L5">
              <text:list-item>
                <text:p text:style-name="P10"><text:span text:style-name="T4">Plant Village Dataset [3]</text:span></text:p>
              </text:list-item>
              <text:list-item>
                <text:p text:style-name="P6"><text:span text:style-name="T4">38 classes de doenças de plantas, incluindo classes de plantas saudáveis e doentes</text:span></text:p>
              </text:list-item>
            </text:list>
          </draw:text-box>
        </draw:frame>
        <presentation:notes draw:style-name="dp2">
          <draw:page-thumbnail draw:name="Google Shape;101;g3f0a8ea28b7_0_10:notes" draw:style-name="gr1" draw:layer="layout" svg:width="16.932cm" svg:height="9.524cm" svg:x="1.059cm" svg:y="1.905cm" draw:page-number="4" presentation:class="page"/>
          <draw:frame draw:name="Google Shape;102;g3f0a8ea28b7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" draw:style-name="dp1" draw:master-page-name="TITLE_5f_AND_5f_BODY" presentation:presentation-page-layout-name="AL2T1">
        <draw:frame draw:name="Google Shape;110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</text:span></text:p>
          </draw:text-box>
        </draw:frame>
        <draw:frame draw:name="Google Shape;111;p17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Pré-Processamento</text:span></text:p>
            <text:list text:style-name="L5">
              <text:list-item>
                <text:p text:style-name="P10"><text:span text:style-name="T4">Criação de uma arquivo no formato CSV com os seguintes atributos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5">Nomes dos arquivos de imagem</text:span></text:p>
                  </text:list-item>
                  <text:list-item>
                    <text:p text:style-name="P6"><text:span text:style-name="T5">Versão do arquivo (colorido, escalas de cinza e segmentado)</text:span></text:p>
                  </text:list-item>
                  <text:list-item>
                    <text:p text:style-name="P6"><text:span text:style-name="T5">Tipo de doença</text:span></text:p>
                  </text:list-item>
                </text:list>
              </text:list-item>
              <text:list-item>
                <text:p text:style-name="P6"><text:span text:style-name="T4">Separação do conjunto de treino e teste</text:span></text:p>
                <text:list>
                  <text:list-item>
                    <text:p text:style-name="P6"><text:span text:style-name="T5">20% para o conjunto de teste</text:span></text:p>
                  </text:list-item>
                  <text:list-item>
                    <text:p text:style-name="P6"><text:span text:style-name="T5">Estado randômico: 10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7;g3f0a8ea28b7_0_15:notes" draw:style-name="gr1" draw:layer="layout" svg:width="16.932cm" svg:height="9.524cm" svg:x="1.059cm" svg:y="1.905cm" draw:page-number="5" presentation:class="page"/>
          <draw:frame draw:name="Google Shape;108;g3f0a8ea28b7_0_1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" draw:style-name="dp1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</text:span></text:p>
          </draw:text-box>
        </draw:frame>
        <draw:frame draw:name="Google Shape;117;p18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Modelos desenvolvidos</text:span></text:p>
            <text:list text:style-name="L5">
              <text:list-item>
                <text:p text:style-name="P10"><text:span text:style-name="T4">ResNet50</text:span></text:p>
              </text:list-item>
              <text:list-item>
                <text:p text:style-name="P6"><text:span text:style-name="T4">EfficientNetV2S</text:span></text:p>
              </text:list-item>
              <text:list-item>
                <text:p text:style-name="P6"><text:span text:style-name="T4">GoogLeNet</text:span></text:p>
              </text:list-item>
            </text:list>
          </draw:text-box>
        </draw:frame>
        <presentation:notes draw:style-name="dp2">
          <draw:page-thumbnail draw:name="Google Shape;113;g3f0a8ea28b7_0_20:notes" draw:style-name="gr1" draw:layer="layout" svg:width="16.932cm" svg:height="9.524cm" svg:x="1.059cm" svg:y="1.905cm" draw:page-number="6" presentation:class="page"/>
          <draw:frame draw:name="Google Shape;114;g3f0a8ea28b7_0_2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5f_AND_5f_BODY" presentation:presentation-page-layout-name="AL2T1">
        <draw:frame draw:name="Google Shape;122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ção</text:span></text:p>
          </draw:text-box>
        </draw:frame>
        <draw:frame draw:name="Google Shape;123;p19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6">ResNet50</text:span></text:p>
            <text:p text:style-name="P7"><text:span text:style-name="T4"/></text:p>
          </draw:text-box>
        </draw:frame>
        <draw:frame draw:name="Google Shape;124;p19" draw:style-name="gr2" draw:text-style-name="P11" draw:layer="layout" svg:width="13.514cm" svg:height="14.286cm" svg:x="11.885cm" svg:y="0cm">
          <draw:image xlink:href="Pictures/1000020100000694000007029A7A8E10873E1AA2.png" xlink:type="simple" xlink:show="embed" xlink:actuate="onLoad">
            <text:p/>
          </draw:image>
        </draw:frame>
        <presentation:notes draw:style-name="dp2">
          <draw:page-thumbnail draw:name="Google Shape;119;g3f338655608_0_0:notes" draw:style-name="gr1" draw:layer="layout" svg:width="16.932cm" svg:height="9.524cm" svg:x="1.059cm" svg:y="1.905cm" draw:page-number="7" presentation:class="page"/>
          <draw:frame draw:name="Google Shape;120;g3f338655608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5f_AND_5f_BODY" presentation:presentation-page-layout-name="AL2T1">
        <draw:frame draw:name="Google Shape;129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ção</text:span></text:p>
          </draw:text-box>
        </draw:frame>
        <draw:frame draw:name="Google Shape;130;p20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12"><text:span text:style-name="T4">EfficientNetV2S</text:span></text:p>
          </draw:text-box>
        </draw:frame>
        <draw:frame draw:name="Google Shape;131;p20" draw:style-name="gr3" draw:text-style-name="P11" draw:layer="layout" svg:width="16.585cm" svg:height="12.869cm" svg:x="8.814cm" svg:y="1.417cm">
          <draw:image xlink:href="Pictures/10000201000007AC000005F4AB7892A3A5885A94.png" xlink:type="simple" xlink:show="embed" xlink:actuate="onLoad">
            <text:p/>
          </draw:image>
        </draw:frame>
        <presentation:notes draw:style-name="dp2">
          <draw:page-thumbnail draw:name="Google Shape;126;g3f338655608_0_8:notes" draw:style-name="gr1" draw:layer="layout" svg:width="16.932cm" svg:height="9.524cm" svg:x="1.059cm" svg:y="1.905cm" draw:page-number="8" presentation:class="page"/>
          <draw:frame draw:name="Google Shape;127;g3f338655608_0_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5f_AND_5f_BODY" presentation:presentation-page-layout-name="AL2T1">
        <draw:frame draw:name="Google Shape;136;p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ção</text:span></text:p>
          </draw:text-box>
        </draw:frame>
        <draw:frame draw:name="Google Shape;137;p21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12"><text:span text:style-name="T4">GoogLeNet</text:span></text:p>
          </draw:text-box>
        </draw:frame>
        <draw:frame draw:name="Google Shape;138;p21" draw:style-name="gr3" draw:text-style-name="P11" draw:layer="layout" svg:width="16.631cm" svg:height="12.903cm" svg:x="8.768cm" svg:y="1.383cm">
          <draw:image xlink:href="Pictures/100002010000080000000635B9FA407A51953CEC.png" xlink:type="simple" xlink:show="embed" xlink:actuate="onLoad">
            <text:p/>
          </draw:image>
        </draw:frame>
        <presentation:notes draw:style-name="dp2">
          <draw:page-thumbnail draw:name="Google Shape;133;g3f338655608_0_14:notes" draw:style-name="gr1" draw:layer="layout" svg:width="16.932cm" svg:height="9.524cm" svg:x="1.059cm" svg:y="1.905cm" draw:page-number="9" presentation:class="page"/>
          <draw:frame draw:name="Google Shape;134;g3f338655608_0_1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5f_AND_5f_BODY" presentation:presentation-page-layout-name="AL2T1">
        <draw:frame draw:name="Google Shape;143;p2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ção</text:span></text:p>
          </draw:text-box>
        </draw:frame>
        <draw:frame draw:name="Google Shape;144;p22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12"><text:span text:style-name="T4">GoogLeNet</text:span></text:p>
          </draw:text-box>
        </draw:frame>
        <draw:frame draw:name="Google Shape;145;p22" draw:style-name="gr3" draw:text-style-name="P11" draw:layer="layout" svg:width="12.891cm" svg:height="14.287cm" svg:x="12.508cm" svg:y="0cm">
          <draw:image xlink:href="Pictures/100002010000073800000800C066304AA9F845FD.png" xlink:type="simple" xlink:show="embed" xlink:actuate="onLoad">
            <text:p/>
          </draw:image>
        </draw:frame>
        <presentation:notes draw:style-name="dp2">
          <draw:page-thumbnail draw:name="Google Shape;140;g3f338655608_0_25:notes" draw:style-name="gr1" draw:layer="layout" svg:width="16.932cm" svg:height="9.524cm" svg:x="1.059cm" svg:y="1.905cm" draw:page-number="10" presentation:class="page"/>
          <draw:frame draw:name="Google Shape;141;g3f338655608_0_2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150;p2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151;p23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12"><text:span text:style-name="T6">ResNet50</text:span></text:p>
          </draw:text-box>
        </draw:frame>
        <draw:frame draw:name="Google Shape;152;p23" draw:style-name="gr3" draw:text-style-name="P11" draw:layer="layout" svg:width="14.405cm" svg:height="12.963cm" svg:x="10.994cm" svg:y="1.324cm">
          <draw:image xlink:href="Pictures/1000020100000800000007336612B48C54D6B7B2.png" xlink:type="simple" xlink:show="embed" xlink:actuate="onLoad">
            <text:p/>
          </draw:image>
        </draw:frame>
        <presentation:notes draw:style-name="dp2">
          <draw:page-thumbnail draw:name="Google Shape;147;g3f0a8ea28b7_0_112:notes" draw:style-name="gr1" draw:layer="layout" svg:width="16.932cm" svg:height="9.524cm" svg:x="1.059cm" svg:y="1.905cm" draw:page-number="11" presentation:class="page"/>
          <draw:frame draw:name="Google Shape;148;g3f0a8ea28b7_0_11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157;p2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158;p24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6">ResNet50</text:span></text:p>
            <text:p text:style-name="P10"><text:span text:style-name="T4">Média da Taxa de Verdadeiro Positivo (TVP): 97,82977590360394%</text:span></text:p>
            <text:p text:style-name="P10"><text:span text:style-name="T4">Média da Taxa de Verdadeiro Negativo (TVN): 99,9515011065704%</text:span></text:p>
            <text:p text:style-name="P10"><text:span text:style-name="T4">Média da Taxa de Falso Positivo (TFP): 00,04849889342958133%</text:span></text:p>
            <text:p text:style-name="P10"><text:span text:style-name="T4">Média da Taxa de Falso Negativo (TFN): 02,170224096396056%</text:span></text:p>
            <text:p text:style-name="P10"><text:span text:style-name="T4">Acurácia: 98,21691627792781%</text:span></text:p>
            <text:p text:style-name="P7"><text:span text:style-name="T4">Perda: <text:s/>5,45535683631897%</text:span></text:p>
          </draw:text-box>
        </draw:frame>
        <presentation:notes draw:style-name="dp2">
          <draw:page-thumbnail draw:name="Google Shape;154;g3f326991561_0_0:notes" draw:style-name="gr1" draw:layer="layout" svg:width="16.932cm" svg:height="9.524cm" svg:x="1.059cm" svg:y="1.905cm" draw:page-number="12" presentation:class="page"/>
          <draw:frame draw:name="Google Shape;155;g3f326991561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163;p2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164;p25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12"><text:span text:style-name="T6">GoogLeNet</text:span></text:p>
          </draw:text-box>
        </draw:frame>
        <draw:frame draw:name="Google Shape;165;p25" draw:style-name="gr3" draw:text-style-name="P11" draw:layer="layout" svg:width="14.182cm" svg:height="12.762cm" svg:x="11.217cm" svg:y="1.524cm">
          <draw:image xlink:href="Pictures/100002010000080000000733B38EABE1D50AF30F.png" xlink:type="simple" xlink:show="embed" xlink:actuate="onLoad">
            <text:p/>
          </draw:image>
        </draw:frame>
        <presentation:notes draw:style-name="dp2">
          <draw:page-thumbnail draw:name="Google Shape;160;g3f0a8ea28b7_0_107:notes" draw:style-name="gr1" draw:layer="layout" svg:width="16.932cm" svg:height="9.524cm" svg:x="1.059cm" svg:y="1.905cm" draw:page-number="13" presentation:class="page"/>
          <draw:frame draw:name="Google Shape;161;g3f0a8ea28b7_0_10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170;p2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171;p26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6">GoogLeNet</text:span></text:p>
            <text:p text:style-name="P10"><text:span text:style-name="T4">Média da Taxa de Verdadeiro Positivo (TVP): 96,82533375121448%</text:span></text:p>
            <text:p text:style-name="P10"><text:span text:style-name="T4">Média da Taxa de Verdadeiro Negativo (TVN): 99,93167297621002%</text:span></text:p>
            <text:p text:style-name="P10"><text:span text:style-name="T4">Média da Taxa de Falso Positivo (TFP): 00,06832702378997811%</text:span></text:p>
            <text:p text:style-name="P10"><text:span text:style-name="T4">Média da Taxa de Falso Negativo (TFN): 03,174666248785538%</text:span></text:p>
            <text:p text:style-name="P10"><text:span text:style-name="T4">Acurácia: 97,80752062797546%</text:span></text:p>
            <text:p text:style-name="P7"><text:span text:style-name="T4">Perda: <text:s/>07,479541748762131%</text:span></text:p>
          </draw:text-box>
        </draw:frame>
        <presentation:notes draw:style-name="dp2">
          <draw:page-thumbnail draw:name="Google Shape;167;g3f31a82227e_0_7:notes" draw:style-name="gr1" draw:layer="layout" svg:width="16.932cm" svg:height="9.524cm" svg:x="1.059cm" svg:y="1.905cm" draw:page-number="14" presentation:class="page"/>
          <draw:frame draw:name="Google Shape;168;g3f31a82227e_0_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176;p2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177;p27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6">EfficientNetV2S</text:span></text:p>
            <text:p text:style-name="P7"><text:span text:style-name="T4"/></text:p>
          </draw:text-box>
        </draw:frame>
        <draw:frame draw:name="Google Shape;178;p27" draw:style-name="gr3" draw:text-style-name="P11" draw:layer="layout" svg:width="14.288cm" svg:height="12.858cm" svg:x="11.111cm" svg:y="1.429cm">
          <draw:image xlink:href="Pictures/100002010000080000000733CA5F4863B2A902FE.png" xlink:type="simple" xlink:show="embed" xlink:actuate="onLoad">
            <text:p/>
          </draw:image>
        </draw:frame>
        <presentation:notes draw:style-name="dp2">
          <draw:page-thumbnail draw:name="Google Shape;173;g3f326991561_0_6:notes" draw:style-name="gr1" draw:layer="layout" svg:width="16.932cm" svg:height="9.524cm" svg:x="1.059cm" svg:y="1.905cm" draw:page-number="15" presentation:class="page"/>
          <draw:frame draw:name="Google Shape;174;g3f326991561_0_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183;p2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184;p28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6">EfficientNetV2S</text:span></text:p>
            <text:p text:style-name="P10"><text:span text:style-name="T4">Média da Taxa de Verdadeiro Positivo (TVP): 98,85987305127136%</text:span></text:p>
            <text:p text:style-name="P10"><text:span text:style-name="T4">Média da Taxa de Verdadeiro Negativo (TVN): 99,97472136956506%</text:span></text:p>
            <text:p text:style-name="P10"><text:span text:style-name="T4">Média da Taxa de Falso Positivo (TFP): 00,02527863043493335%</text:span></text:p>
            <text:p text:style-name="P10"><text:span text:style-name="T4">Média da Taxa de Falso Negativo (TFN): 01,1401269487286432%</text:span></text:p>
            <text:p text:style-name="P10"><text:span text:style-name="T4">Acurácia: 99,06702676160078%</text:span></text:p>
            <text:p text:style-name="P7"><text:span text:style-name="T4">Perda: <text:s/>02,663467451930046%</text:span></text:p>
          </draw:text-box>
        </draw:frame>
        <presentation:notes draw:style-name="dp2">
          <draw:page-thumbnail draw:name="Google Shape;180;g3f326991561_0_11:notes" draw:style-name="gr1" draw:layer="layout" svg:width="16.932cm" svg:height="9.524cm" svg:x="1.059cm" svg:y="1.905cm" draw:page-number="16" presentation:class="page"/>
          <draw:frame draw:name="Google Shape;181;g3f326991561_0_1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1" draw:master-page-name="TITLE_5f_AND_5f_BODY" presentation:presentation-page-layout-name="AL2T1">
        <draw:frame draw:name="Google Shape;189;p2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clusão</text:span></text:p>
          </draw:text-box>
        </draw:frame>
        <draw:frame draw:name="Google Shape;190;p29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12"><text:span text:style-name="T4">O modelo </text:span><text:span text:style-name="T6">EfficientNetV2S</text:span><text:span text:style-name="T4"> foi o que obteve a melhor acurácia quando comparado ao </text:span><text:span text:style-name="T6">GoogLeNet</text:span><text:span text:style-name="T4"> e ao </text:span><text:span text:style-name="T6">ResNet50</text:span><text:span text:style-name="T4"> para o Dataset PlantVillage.</text:span></text:p>
          </draw:text-box>
        </draw:frame>
        <presentation:notes draw:style-name="dp2">
          <draw:page-thumbnail draw:name="Google Shape;186;g3f0a8ea28b7_0_122:notes" draw:style-name="gr1" draw:layer="layout" svg:width="16.932cm" svg:height="9.524cm" svg:x="1.059cm" svg:y="1.905cm" draw:page-number="17" presentation:class="page"/>
          <draw:frame draw:name="Google Shape;187;g3f0a8ea28b7_0_12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195;p3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ferências</text:span></text:p>
          </draw:text-box>
        </draw:frame>
        <draw:frame draw:name="Google Shape;196;p30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[1] HAMED, Bahaa S.; HUSSEIN, Mahmoud M.; MOUSA, Afaf M. Plant disease detection using deep learning. International Journal of Intelligent Systems and Applications, v. 15, n. 6, p. 38-50, 2023.</text:span></text:p>
            <text:p text:style-name="P10"><text:span text:style-name="T4">[2] P. Pandey, K. Patyane, M. Padekar, R. Mohite, P. Mane and A. Avhad, "Plant Disease Detection Using Deep Learning Model - Application FarmEasy," 2023 International Conference on Advanced Computing Technologies and Applications (ICACTA), Mumbai, India, 2023, pp. 1-6, doi: 10.1109/ICACTA58201.2023.10393095. keywords: {Deep learning;Training;Plant diseases;Computer vision;Machine learning algorithms;Automation;Manuals;Machine learning;Plant disease;Image analysis;Convolutional neural networks;Disease detection;Precision agriculture;Feature extraction},</text:span></text:p>
            <text:p text:style-name="P10"><text:span text:style-name="T4">[3] PLANTVILLAGE Dataset. Kaggle, 2019. Disponível em: https://www.kaggle.com/datasets/abdallahalidev/plantvillage-dataset. Acesso em: 18 jun. 2026.</text:span></text:p>
            <text:p text:style-name="P7"><text:span text:style-name="T4"/></text:p>
          </draw:text-box>
        </draw:frame>
        <presentation:notes draw:style-name="dp2">
          <draw:page-thumbnail draw:name="Google Shape;192;g3f0a8ea28b7_0_25:notes" draw:style-name="gr1" draw:layer="layout" svg:width="16.932cm" svg:height="9.524cm" svg:x="1.059cm" svg:y="1.905cm" draw:page-number="18" presentation:class="page"/>
          <draw:frame draw:name="Google Shape;193;g3f0a8ea28b7_0_2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Dev/6.0.5.2$Linux_X86_64 LibreOffice_project/</meta:generator>
  </office:meta>
</office:document-meta>
</file>